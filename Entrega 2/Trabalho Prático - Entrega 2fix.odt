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4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397cm" fo:line-height="100%" fo:background-color="#ffffff" fo:padding="0cm" fo:border="none">
        <style:background-image/>
      </style:paragraph-properties>
    </style:style>
    <style:style style:name="P2" style:family="paragraph" style:parent-style-name="Heading_20_3">
      <style:paragraph-properties fo:background-color="#ffffff" fo:padding="0cm" fo:border="none">
        <style:background-image/>
      </style:paragraph-properties>
    </style:style>
    <style:style style:name="P3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4" style:family="paragraph" style:parent-style-name="Heading_20_3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5" style:family="paragraph" style:parent-style-name="Standard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6" style:family="paragraph" style:parent-style-name="Text_20_body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7" style:family="paragraph" style:parent-style-name="Text_20_body" style:list-style-name="L1" style:master-page-name="">
      <style:paragraph-properties fo:margin-top="0cm" fo:margin-bottom="0cm" fo:line-height="100%" style:page-number="auto"/>
    </style:style>
    <style:style style:name="P8" style:family="paragraph" style:parent-style-name="Text_20_body" style:list-style-name="L1">
      <style:paragraph-properties fo:margin-top="0cm" fo:margin-bottom="0cm" fo:line-height="100%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Standard" style:list-style-name="WWNum1">
      <style:paragraph-properties fo:margin-left="1.058cm" fo:margin-right="0cm" fo:text-indent="-0.635cm" style:auto-text-indent="false" fo:background-color="#ffffff" fo:padding="0cm" fo:border="none">
        <style:background-image/>
      </style:paragraph-properties>
    </style:style>
    <style:style style:name="P11" style:family="paragraph" style:parent-style-name="Standard" style:list-style-name="WWNum1" style:master-page-name="Standard">
      <style:paragraph-properties fo:margin-left="1.27cm" fo:margin-right="0cm" fo:margin-top="0cm" fo:margin-bottom="0cm" fo:line-height="100%" fo:keep-together="auto" fo:orphans="2" fo:widows="2" fo:text-indent="-0.635cm" style:auto-text-indent="false" style:page-number="auto" fo:background-color="#ffffff" fo:padding="0cm" fo:border="none" fo:keep-with-next="auto">
        <style:background-image/>
      </style:paragraph-properties>
    </style:style>
    <style:style style:name="P12" style:family="paragraph" style:parent-style-name="Standard" style:list-style-name="WWNum1">
      <style:paragraph-properties fo:margin-left="1.27cm" fo:margin-right="0cm" fo:margin-top="0cm" fo:margin-bottom="0cm" fo:line-height="100%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 fo:background-color="#ffffff" fo:padding="0cm" fo:border="none">
        <style:background-image/>
      </style:paragraph-properties>
      <style:text-properties fo:font-weight="normal" style:font-weight-asian="normal" style:font-weight-complex="normal"/>
    </style:style>
    <style:style style:name="P14" style:family="paragraph" style:parent-style-name="Heading_20_3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15" style:family="paragraph" style:parent-style-name="Heading_20_1" style:master-page-name="Standard">
      <style:paragraph-properties style:page-number="auto" fo:background-color="#ffffff" fo:padding="0cm" fo:border="none">
        <style:background-image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Universidade Tecnológica Federal do Paraná</text:h>
      <text:h text:style-name="P1" text:outline-level="2">Trabalho Prático - Entrega 2: Mapeamento para o Modelo Relacional</text:h>
      <text:p text:style-name="P3"><text:span text:style-name="T2">Curso:</text:span> Ciência da Computação</text:p>
      <text:p text:style-name="P3"><text:span text:style-name="T2">Disciplina:</text:span> Banco de Dados</text:p>
      <text:p text:style-name="P3"><text:span text:style-name="T2">Professor:</text:span> Walter Takashi Nakamura</text:p>
      <text:p text:style-name="P3"><text:span text:style-name="T2">Sistema:</text:span> Luma (Streaming)</text:p>
      <text:p text:style-name="P3"><text:span text:style-name="T2">Data:</text:span> 18/05/2026</text:p>
      <text:h text:style-name="P2" text:outline-level="3">1. Mapeamento do DER para o Modelo Relacional (Esquema Lógico Inicial)</text:h>
      <text:p text:style-name="P3">Abaixo, o mapeamento inicial derivado do Diagrama Entidade-Relacionamento, seguindo as regras de integridade referencial e as chaves indicadas.</text:p>
      <text:list xml:id="list7369521937467133974" text:style-name="WWNum1">
        <text:list-item>
          <text:p text:style-name="P10"><text:span text:style-name="T2">usuario</text:span> (<text:span text:style-name="T3">id</text:span>, nome, cpf, email, endereco, telefone)</text:p>
        </text:list-item>
        <text:list-item>
          <text:p text:style-name="P10"><text:span text:style-name="T2">perfil</text:span> (<text:span text:style-name="T3">id</text:span>, nome, tipo, id_usuario_FK)</text:p>
        </text:list-item>
        <text:list-item>
          <text:p text:style-name="P10"><text:span text:style-name="T2">assinatura</text:span> (<text:span text:style-name="T3">id</text:span>, data_inicio, data_fim, status, id_usuario_FK)</text:p>
        </text:list-item>
        <text:list-item>
          <text:p text:style-name="P10"><text:span text:style-name="T2">plat_pagamento</text:span> (<text:span text:style-name="T3">id_plataforma</text:span>, nome, tipo, status)</text:p>
        </text:list-item>
        <text:list-item>
          <text:p text:style-name="P10"><text:span text:style-name="T2">pagamento</text:span> (<text:span text:style-name="T3">id</text:span>, valor, data_pagamento, status, id_assinatura_FK, id_plataforma_FK)</text:p>
        </text:list-item>
        <text:list-item>
          <text:p text:style-name="P10"><text:span text:style-name="T2">dispositivo</text:span> (<text:span text:style-name="T3">id</text:span>, tipo, sistema, modelo)</text:p>
        </text:list-item>
        <text:list-item>
          <text:p text:style-name="P10"><text:span text:style-name="T2">acesso</text:span> (<text:span text:style-name="T3">id</text:span>, data_hora, login, ip, localizacao, id_usuario_FK, id_dispositivo_FK)</text:p>
        </text:list-item>
        <text:list-item>
          <text:p text:style-name="P10"><text:span text:style-name="T2">listas</text:span> (<text:span text:style-name="T3">id</text:span>, nome, data_criacao, id_perfil_FK)</text:p>
        </text:list-item>
        <text:list-item>
          <text:p text:style-name="P10"><text:span text:style-name="T2">classificacao</text:span> (<text:span text:style-name="T3">id</text:span>, faixa_etaria)</text:p>
        </text:list-item>
        <text:list-item>
          <text:p text:style-name="P10"><text:span text:style-name="T2">midia</text:span> (<text:span text:style-name="T3">id_midia</text:span>, titulo, sinopse, data_lancamento, id_classificacao_FK)</text:p>
        </text:list-item>
        <text:list-item>
          <text:p text:style-name="P10"><text:span text:style-name="T2">filme</text:span> (<text:span text:style-name="T3">id_midia_FK</text:span>, duracao_total, diretor, oscar_vencido)</text:p>
        </text:list-item>
        <text:list-item>
          <text:p text:style-name="P10"><text:span text:style-name="T2">serie</text:span> (<text:span text:style-name="T3">id_midia_FK</text:span>, status, data_inicio, data_fim)</text:p>
        </text:list-item>
        <text:list-item>
          <text:p text:style-name="P10"><text:span text:style-name="T2">temporada</text:span> (<text:span text:style-name="T3">id</text:span>, numero, descricao, id_midia_serie_FK)</text:p>
        </text:list-item>
        <text:list-item>
          <text:p text:style-name="P10"><text:span text:style-name="T2">episodio</text:span> (<text:span text:style-name="T3">id</text:span>, numero_episodio, id_temporada_FK)</text:p>
        </text:list-item>
        <text:list-item>
          <text:p text:style-name="P10"><text:span text:style-name="T2">categoria</text:span> (<text:span text:style-name="T3">id</text:span>, nome, descricao)</text:p>
        </text:list-item>
        <text:list-item>
          <text:p text:style-name="P10"><text:span text:style-name="T2">midia_categoria</text:span> (<text:span text:style-name="T3">id_midia_FK</text:span>, <text:span text:style-name="T3">id_categoria_FK</text:span>)</text:p>
        </text:list-item>
        <text:list-item>
          <text:p text:style-name="P10"><text:span text:style-name="T2">audio</text:span> (<text:span text:style-name="T3">id</text:span>, idioma, formato, id_midia_FK, id_episodio_FK)</text:p>
        </text:list-item>
        <text:list-item>
          <text:p text:style-name="P10"><text:span text:style-name="T2">legendas</text:span> (<text:span text:style-name="T3">id</text:span>, idioma, formato, id_midia_FK, id_episodio_FK)</text:p>
        </text:list-item>
        <text:list-item>
          <text:p text:style-name="P10"><text:span text:style-name="T2">avaliacao</text:span> (<text:span text:style-name="T3">id</text:span>, nota, comentario, data_avaliacao, id_perfil_FK, id_midia_FK)</text:p>
        </text:list-item>
        <text:list-item>
          <text:p text:style-name="P10"><text:span text:style-name="T2">recomendacao</text:span> (<text:span text:style-name="T3">id</text:span>, data, algoritmo, id_perfil_FK, id_midia_FK)</text:p>
        </text:list-item>
        <text:list-item>
          <text:p text:style-name="P10"><text:span text:style-name="T2">hist_visualizacao</text:span> (<text:span text:style-name="T3">id</text:span>, data_visualizacao, progresso, id_perfil_FK, id_midia_FK, id_episodio_FK)</text:p>
        </text:list-item>
      </text:list>
      <text:p text:style-name="P5"/>
      <text:h text:style-name="P4" text:outline-level="3">2. Aplicando a 1FN:</text:h>
      <text:list xml:id="list31790350" text:continue-numbering="true" text:style-name="WWNum1">
        <text:list-item>
          <text:p text:style-name="P11"><text:span text:style-name="T2">Usuario </text:span>(<text:span text:style-name="T3">id_usuario</text:span>, nome, cpf, email, endereco, telefone)</text:p>
        </text:list-item>
        <text:list-item>
          <text:p text:style-name="P12"><text:span text:style-name="T2">perfil </text:span>(<text:span text:style-name="T3">id_perfil</text:span>, nome, tipo, id_usuario_FK)</text:p>
        </text:list-item>
        <text:list-item>
          <text:p text:style-name="P12"><text:span text:style-name="T2">lista </text:span>(<text:span text:style-name="T3">id_lista</text:span>, nome, data_criacao, id_perfil_FK)</text:p>
        </text:list-item>
        <text:list-item>
          <text:p text:style-name="P12"><text:span text:style-name="T2">acesso </text:span>(<text:span text:style-name="T3">id_acesso</text:span>, data_hora, login, ip, localizacao, id_usuario_FK, id_dispositivo_FK)</text:p>
        </text:list-item>
        <text:list-item>
          <text:p text:style-name="P12"><text:span text:style-name="T2">dispositivo </text:span>(<text:span text:style-name="T3">id_dispositivo</text:span>, tipo, sistema_operacional, modelo)</text:p>
        </text:list-item>
        <text:list-item>
          <text:p text:style-name="P12"><text:span text:style-name="T2">assinatura </text:span>(<text:span text:style-name="T3">id_assinatura</text:span>, data_inicio, data_fim, status, id_usuario_FK)</text:p>
        </text:list-item>
        <text:list-item>
          <text:p text:style-name="P12"><text:span text:style-name="T2">plat_pagamento </text:span>(<text:span text:style-name="T3">id_plataforma</text:span>, nome, tipo, status)</text:p>
        </text:list-item>
        <text:list-item>
          <text:p text:style-name="P12"><text:span text:style-name="T2">pagamento </text:span>(<text:span text:style-name="T3">id_pagamento</text:span>, valor, data_pagamento, status, id_assinatura_FK, id_plataforma_FK)</text:p>
        </text:list-item>
        <text:list-item>
          <text:p text:style-name="P12"><text:span text:style-name="T2">classificacao </text:span>(<text:span text:style-name="T3">id_classificacao</text:span>, faixa_etaria)</text:p>
        </text:list-item>
        <text:list-item>
          <text:p text:style-name="P12"><text:span text:style-name="T2">midia </text:span>(<text:span text:style-name="T3">id_midia</text:span>, titulo, sinopse, data_lancamento, id_classificacao_FK)</text:p>
        </text:list-item>
        <text:list-item>
          <text:p text:style-name="P12"><text:span text:style-name="T2">filme </text:span>(<text:span text:style-name="T3">id_midia_FK</text:span>, duracao_total, diretor, oscar_vencidos)</text:p>
        </text:list-item>
        <text:list-item>
          <text:p text:style-name="P12"><text:span text:style-name="T2">serie </text:span>(<text:span text:style-name="T3">id_midia_FK</text:span>, titulo, descricao, data_inicio, data_fim)</text:p>
        </text:list-item>
        <text:list-item>
          <text:p text:style-name="P12"><text:span text:style-name="T2">temporada </text:span>(<text:span text:style-name="T3">id_temporada</text:span>, numero, descricao, id_serie_FK)</text:p>
        </text:list-item>
        <text:list-item>
          <text:p text:style-name="P12"><text:span text:style-name="T2">episodio </text:span>(<text:span text:style-name="T3">id_episodio</text:span>, numero_episodio, id_temporada_FK)</text:p>
        </text:list-item>
        <text:list-item>
          <text:p text:style-name="P12"><text:span text:style-name="T2">categoria </text:span>(<text:span text:style-name="T3">id_categoria</text:span>, nome, descricao)</text:p>
        </text:list-item>
        <text:list-item>
          <text:p text:style-name="P12"><text:span text:style-name="T2">midia_categoria </text:span>(<text:span text:style-name="T3">id_midia</text:span>, id_categoria_FK, pk(id_midia, id_categoria))</text:p>
        </text:list-item>
        <text:list-item>
          <text:p text:style-name="P12"><text:span text:style-name="T2">audio </text:span>(<text:span text:style-name="T3">id_audio</text:span>, idioma, formato, id_midia_FK, id_episodio_FK)</text:p>
        </text:list-item>
        <text:list-item>
          <text:p text:style-name="P12"><text:span text:style-name="T2">legenda </text:span>(<text:span text:style-name="T3">id_legenda</text:span>, idioma, formato, id_midia_FK, id_episodio_FK)</text:p>
        </text:list-item>
        <text:list-item>
          <text:p text:style-name="P12"><text:span text:style-name="T2">avaliacao </text:span>(<text:span text:style-name="T3">id_avaliacao</text:span>, nota, comentario, data_avaliacao, id_perfil_FK, id_midia_FK)</text:p>
        </text:list-item>
        <text:list-item>
          <text:p text:style-name="P12"><text:span text:style-name="T2">recomendacao </text:span>(<text:span text:style-name="T3">id_recomendacao</text:span>, algoritmo, data_geracao, id_perfil_FK, id_midia_FK)</text:p>
        </text:list-item>
        <text:list-item>
          <text:p text:style-name="P12"><text:span text:style-name="T2">hist_visualizacao </text:span>(<text:span text:style-name="T3">id_hist</text:span>, data_visualizacao, progresso, id_perfil_FK, id_midia_FK, id_episodio_FK)</text:p>
        </text:list-item>
      </text:list>
      <text:p text:style-name="Standard"/>
      <text:h text:style-name="P4" text:outline-level="3">3. Aplicando a 2FN:</text:h>
      <text:p text:style-name="P13">No modelo proposto, a maioria das tabelas possui chave primária simples, portanto não há possibilidade de dependência parcial.<text:line-break/>A única tabela com chave composta é midia_categoria, cuja chave é (id_midia_FK, id_categoria_FK). </text:p>
      <text:p text:style-name="P13">Como essa tabela não possui atributos adicionais além da chave composta, ela já se encontra automaticamente na 2FN.</text:p>
      <text:p text:style-name="P5"/>
      <text:h text:style-name="P4" text:outline-level="3">4. Aplicando a 3FN:</text:h>
      <text:p text:style-name="P6">As informações de <text:span text:style-name="Strong_20_Emphasis"><text:span text:style-name="T4">classificação indicativa</text:span></text:span> foram mantidas separadas da tabela de mídia para evitar dependência transitiva.</text:p>
      <text:p text:style-name="Text_20_body">classificacao (id_classificacao, faixa_etaria)<text:line-break/>midia (id_midia, titulo, sinopse, data_lancamento, id_classificacao_FK)</text:p>
      <text:p text:style-name="P6">As características específicas de cada tipo de mídia foram mantidas separadas em tabelas próprias.</text:p>
      <text:p text:style-name="Text_20_body">filme (id_midia_FK, duracao_total, diretor, oscar_vencidos)<text:line-break/>serie (id_midia_FK, data_inicio, data_fim)</text:p>
      <text:p text:style-name="P6">A estrutura hierárquica de séries foi dividida em entidades próprias.</text:p>
      <text:p text:style-name="Text_20_body">temporada (id_temporada, numero, descricao, id_serie_FK)<text:line-break/><text:soft-page-break/>episodio (id_episodio, numero_episodio, id_temporada_FK)</text:p>
      <text:p text:style-name="Text_20_body">As informações de áudio e legenda foram mantidas separadas para permitir múltiplos registros por mídia ou episódio.</text:p>
      <text:p text:style-name="Text_20_body">audio (id_audio, idioma, formato, id_midia_FK, id_episodio_FK)<text:line-break/>legenda (id_legenda, idioma, formato, id_midia_FK, id_episodio_FK)</text:p>
      <text:p text:style-name="Text_20_body">com tudo isso a tabela ficou da seguinte maneira:</text:p>
      <text:list xml:id="list9022241157884540236" text:style-name="L1">
        <text:list-item>
          <text:p text:style-name="P7"><text:span text:style-name="Strong_20_Emphasis">usuario </text:span>(<text:span text:style-name="T3">id_usuario</text:span>, nome, cpf, email, endereco, telefone)</text:p>
        </text:list-item>
        <text:list-item>
          <text:p text:style-name="P8"><text:span text:style-name="Strong_20_Emphasis">perfil </text:span>(<text:span text:style-name="T3">id_perfil</text:span>, nome, tipo, id_usuario_FK)</text:p>
        </text:list-item>
        <text:list-item>
          <text:p text:style-name="P8"><text:span text:style-name="Strong_20_Emphasis">lista </text:span>(<text:span text:style-name="T3">id_lista</text:span>, nome, data_criacao, id_perfil_FK)</text:p>
        </text:list-item>
        <text:list-item>
          <text:p text:style-name="P8"><text:span text:style-name="Strong_20_Emphasis">acesso </text:span>(<text:span text:style-name="T3">id_acesso</text:span>, data_hora, login, ip, localizacao, id_usuario_FK, id_dispositivo_FK)</text:p>
        </text:list-item>
        <text:list-item>
          <text:p text:style-name="P8"><text:span text:style-name="Strong_20_Emphasis">dispositivo </text:span>(<text:span text:style-name="T3">id_dispositivo</text:span>, tipo, sistema_operacional, modelo)</text:p>
        </text:list-item>
        <text:list-item>
          <text:p text:style-name="P8"><text:span text:style-name="Strong_20_Emphasis">assinatura </text:span>(<text:span text:style-name="T3">id_assinatura</text:span>, data_inicio, data_fim, status, id_usuario_FK)</text:p>
        </text:list-item>
        <text:list-item>
          <text:p text:style-name="P8"><text:span text:style-name="Strong_20_Emphasis">plat_pagamento </text:span>(<text:span text:style-name="T3">id_plataforma</text:span>, nome, tipo, status)</text:p>
        </text:list-item>
        <text:list-item>
          <text:p text:style-name="P8"><text:span text:style-name="Strong_20_Emphasis">pagamento </text:span>(<text:span text:style-name="T3">id_pagamento</text:span>, valor, data_pagamento, status, id_assinatura_FK, id_plataforma_FK)</text:p>
        </text:list-item>
        <text:list-item>
          <text:p text:style-name="P8"><text:span text:style-name="Strong_20_Emphasis">classificacao </text:span>(<text:span text:style-name="T3">id_classificacao</text:span>, faixa_etaria)</text:p>
        </text:list-item>
        <text:list-item>
          <text:p text:style-name="P8"><text:span text:style-name="Strong_20_Emphasis">midia </text:span>(<text:span text:style-name="T3">id_midia</text:span>, titulo, sinopse, data_lancamento, id_classificacao_FK)</text:p>
        </text:list-item>
        <text:list-item>
          <text:p text:style-name="P8"><text:span text:style-name="Strong_20_Emphasis">filme </text:span>(<text:span text:style-name="T3">id_midia_FK</text:span>, duracao_total, diretor, oscar_vencidos)</text:p>
        </text:list-item>
        <text:list-item>
          <text:p text:style-name="P8"><text:span text:style-name="Strong_20_Emphasis">serie </text:span>(<text:span text:style-name="T3">id_midia_FK</text:span>, data_inicio, data_fim)</text:p>
        </text:list-item>
        <text:list-item>
          <text:p text:style-name="P8"><text:span text:style-name="Strong_20_Emphasis">temporada </text:span>(<text:span text:style-name="T3">id_temporada</text:span>, numero, descricao, id_serie_FK)</text:p>
        </text:list-item>
        <text:list-item>
          <text:p text:style-name="P8"><text:span text:style-name="Strong_20_Emphasis">episodio </text:span>(<text:span text:style-name="T3">id_episodio</text:span>, numero_episodio, id_temporada_FK)</text:p>
        </text:list-item>
        <text:list-item>
          <text:p text:style-name="P8"><text:span text:style-name="Strong_20_Emphasis">categoria </text:span>(<text:span text:style-name="T3">id_categoria</text:span>, nome, descricao)</text:p>
        </text:list-item>
        <text:list-item>
          <text:p text:style-name="P8"><text:span text:style-name="Strong_20_Emphasis">midia_categoria </text:span>(<text:span text:style-name="T3">id_midia_FK</text:span>, <text:span text:style-name="T3">id_categoria_FK)</text:span></text:p>
        </text:list-item>
        <text:list-item>
          <text:p text:style-name="P8"><text:span text:style-name="Strong_20_Emphasis">audio </text:span>(<text:span text:style-name="T3">id_audio</text:span>, idioma, formato, id_midia_FK, id_episodio_FK)</text:p>
        </text:list-item>
        <text:list-item>
          <text:p text:style-name="P8"><text:span text:style-name="Strong_20_Emphasis">legenda </text:span>(<text:span text:style-name="T3">id_legenda</text:span>, idioma, formato, id_midia_FK, id_episodio_FK)</text:p>
        </text:list-item>
        <text:list-item>
          <text:p text:style-name="P8"><text:span text:style-name="Strong_20_Emphasis">avaliacao </text:span>(<text:span text:style-name="T3">id_avaliacao</text:span>, nota, comentario, data_avaliacao, id_perfil_FK, id_midia_FK)</text:p>
        </text:list-item>
        <text:list-item>
          <text:p text:style-name="P8"><text:span text:style-name="Strong_20_Emphasis">recomendacao </text:span>(<text:span text:style-name="T3">id_recomendacao</text:span>, algoritmo, data_geracao, id_perfil_FK, id_midia_FK)</text:p>
        </text:list-item>
        <text:list-item>
          <text:p text:style-name="P8"><text:span text:style-name="Strong_20_Emphasis">hist_visualizacao </text:span>(i<text:span text:style-name="T3">d_hist, data_visualizacao</text:span>, progresso, id_perfil_FK, id_midia_FK, id_episodio_FK)</text:p>
          <text:p text:style-name="P9"/>
        </text:list-item>
      </text:list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4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.847cm" fo:margin-bottom="0.212cm" fo:line-height="100%" fo:text-align="start" style:justify-single-word="false" fo:keep-together="always" fo:keep-with-next="always"/>
      <style:text-properties style:font-name="Arial1" fo:font-size="36pt" fo:font-weight="bold" style:font-name-asian="Microsoft YaHei" style:font-size-asian="36pt" style:font-weight-asian="bold" style:font-name-complex="Arial3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423cm" fo:line-height="100%" fo:background-color="#ffffff" fo:padding="0cm" fo:border="none">
        <style:background-image/>
      </style:paragraph-properties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397cm" fo:margin-bottom="0.397cm" fo:line-height="100%" fo:background-color="#ffffff" fo:padding="0cm" fo:border="none">
        <style:background-image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423cm" fo:line-height="100%" fo:background-color="#ffffff" fo:padding="0cm" fo:border="none">
        <style:background-image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5cm" fo:margin-bottom="0.45cm" fo:line-height="100%" fo:background-color="#ffffff" fo:padding="0cm" fo:border="none">
        <style:background-image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5cm" fo:margin-bottom="0.45cm" fo:line-height="100%" fo:background-color="#ffffff" fo:padding="0cm" fo:border="non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635cm" fo:margin-bottom="0.635cm" fo:line-height="100%" fo:background-color="#ffffff" fo:padding="0cm" fo:border="none">
        <style:background-image/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Arial2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5-18T11:52:14.51</dc:date>
    <meta:generator>OpenOffice/4.1.16$Win32 OpenOffice.org_project/4116m3$Build-9816</meta:generator>
    <meta:editing-duration>PT35M35S</meta:editing-duration>
    <meta:editing-cycles>1</meta:editing-cycles>
    <meta:document-statistic meta:table-count="0" meta:image-count="0" meta:object-count="0" meta:page-count="3" meta:paragraph-count="86" meta:word-count="637" meta:character-count="5701"/>
  </office:meta>
</office:document-meta>
</file>