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/>
  </office:font-face-decls>
  <office:automatic-styles>
    <style:style style:name="P1" style:family="paragraph" style:parent-style-name="Heading_20_1" style:master-page-name="Standard">
      <loext:graphic-properties draw:fill="solid" draw:fill-color="#ffffff" draw:opacity="100%"/>
      <style:paragraph-properties style:page-number="auto" fo:background-color="#ffffff" fo:padding="0cm" fo:border="none"/>
    </style:style>
    <style:style style:name="P2" style:family="paragraph" style:parent-style-name="Heading_20_2">
      <loext:graphic-properties draw:fill="solid" draw:fill-color="#ffffff" draw:opacity="100%"/>
      <style:paragraph-properties fo:margin-top="0cm" fo:margin-bottom="0.397cm" style:contextual-spacing="false" fo:line-height="100%" fo:background-color="#ffffff" fo:padding="0cm" fo:border="none"/>
    </style:style>
    <style:style style:name="P3" style:family="paragraph" style:parent-style-name="Standard">
      <loext:graphic-properties draw:fill="solid" draw:fill-color="#ffffff" draw:opacity="100%"/>
      <style:paragraph-properties fo:background-color="#ffffff" fo:padding="0cm" fo:border="none"/>
    </style:style>
    <style:style style:name="P4" style:family="paragraph" style:parent-style-name="Heading_20_3">
      <loext:graphic-properties draw:fill="solid" draw:fill-color="#ffffff" draw:opacity="100%"/>
      <style:paragraph-properties fo:background-color="#ffffff" fo:padding="0cm" fo:border="none"/>
    </style:style>
    <style:style style:name="P5" style:family="paragraph" style:parent-style-name="Standard" style:list-style-name="WWNum1">
      <loext:graphic-properties draw:fill="solid" draw:fill-color="#ffffff" draw:opacity="100%"/>
      <style:paragraph-properties fo:margin-left="1.058cm" fo:margin-right="0cm" fo:text-indent="-0.635cm" style:auto-text-indent="false" fo:background-color="#ffffff" fo:padding="0cm" fo:border="none"/>
    </style:style>
    <style:style style:name="P6" style:family="paragraph" style:parent-style-name="Standard">
      <loext:graphic-properties draw:fill="solid" draw:fill-color="#ffffff" draw:opacity="100%"/>
      <style:paragraph-properties fo:margin-left="0.423cm" fo:margin-right="0cm" fo:text-indent="0cm" style:auto-text-indent="false" fo:background-color="#ffffff" fo:padding="0cm" fo:border="none"/>
    </style:style>
    <style:style style:name="P7" style:family="paragraph" style:parent-style-name="Heading_20_3">
      <loext:graphic-properties draw:fill="solid" draw:fill-color="#ffffff" draw:opacity="100%"/>
      <style:paragraph-properties fo:margin-left="0.423cm" fo:margin-right="0cm" fo:text-indent="0cm" style:auto-text-indent="false" fo:background-color="#ffffff" fo:padding="0cm" fo:border="none"/>
    </style:style>
    <style:style style:name="P8" style:family="paragraph" style:parent-style-name="Text_20_body">
      <style:text-properties officeooo:paragraph-rsid="000e1af8"/>
    </style:style>
    <style:style style:name="P9" style:family="paragraph" style:parent-style-name="Standard" style:list-style-name="WWNum1" style:master-page-name="Standard">
      <loext:graphic-properties draw:fill="solid" draw:fill-color="#ffffff" draw:opacity="100%"/>
      <style:paragraph-properties fo:margin-left="1.27cm" fo:margin-right="0cm" fo:margin-top="0cm" fo:margin-bottom="0cm" style:contextual-spacing="false" fo:line-height="100%" fo:keep-together="auto" fo:orphans="2" fo:widows="2" fo:text-indent="-0.635cm" style:auto-text-indent="false" style:page-number="auto" fo:background-color="#ffffff" fo:padding="0cm" fo:border="none" fo:keep-with-next="auto"/>
    </style:style>
    <style:style style:name="P10" style:family="paragraph" style:parent-style-name="Standard" style:list-style-name="WWNum1">
      <loext:graphic-properties draw:fill="solid" draw:fill-color="#ffffff" draw:opacity="100%"/>
      <style:paragraph-properties fo:margin-left="1.27cm" fo:margin-right="0cm" fo:margin-top="0cm" fo:margin-bottom="0cm" style:contextual-spacing="false" fo:line-height="100%" fo:keep-together="auto" fo:orphans="2" fo:widows="2" fo:text-indent="-0.635cm" style:auto-text-indent="false" fo:background-color="#ffffff" fo:padding="0cm" fo:border="none" fo:keep-with-next="auto"/>
    </style:style>
    <style:style style:name="P11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fo:padding="0cm" fo:border="none"/>
    </style:style>
    <style:style style:name="P12" style:family="paragraph" style:parent-style-name="Text_20_body">
      <loext:graphic-properties draw:fill="solid" draw:fill-color="#ffffff" draw:opacity="100%"/>
      <style:paragraph-properties fo:margin-left="0.423cm" fo:margin-right="0cm" fo:text-indent="0cm" style:auto-text-indent="false" fo:background-color="#ffffff" fo:padding="0cm" fo:border="none"/>
    </style:style>
    <style:style style:name="P13" style:family="paragraph" style:parent-style-name="Text_20_body" style:list-style-name="L1" style:master-page-name="">
      <style:paragraph-properties fo:margin-top="0cm" fo:margin-bottom="0cm" style:contextual-spacing="false" fo:line-height="100%" style:page-number="auto"/>
    </style:style>
    <style:style style:name="P14" style:family="paragraph" style:parent-style-name="Text_20_body" style:list-style-name="L1">
      <style:paragraph-properties fo:margin-top="0cm" fo:margin-bottom="0cm" style:contextual-spacing="false" fo:line-height="100%"/>
    </style:style>
    <style:style style:name="P1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e1af8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niversidade Tecnológica Federal do Paraná</text:h>
      <text:h text:style-name="P2" text:outline-level="2">Trabalho Prático - Entrega 2: Mapeamento para o Modelo Relacional</text:h>
      <text:p text:style-name="P3"><text:span text:style-name="T1">Curso:</text:span> Ciência da Computação</text:p>
      <text:p text:style-name="P3"><text:span text:style-name="T1">Disciplina:</text:span> Banco de Dados</text:p>
      <text:p text:style-name="P3"><text:span text:style-name="T1">Professor:</text:span> Walter Takashi Nakamura</text:p>
      <text:p text:style-name="P3"><text:span text:style-name="T1">Sistema:</text:span> Luma (Streaming)</text:p>
      <text:p text:style-name="P3"><text:span text:style-name="T1">Data:</text:span> 18/05/2026</text:p>
      <text:h text:style-name="P4" text:outline-level="3">1. Mapeamento do DER para o Modelo Relacional (Esquema Lógico Inicial)</text:h>
      <text:p text:style-name="P3">Abaixo, o mapeamento inicial derivado do Diagrama Entidade-Relacionamento, seguindo as regras de integridade referencial e as chaves indicadas.</text:p>
      <text:list text:style-name="WWNum1">
        <text:list-item>
          <text:p text:style-name="P5"><text:span text:style-name="T1">usuario</text:span> (<text:span text:style-name="T2">id</text:span>, nome, cpf, email, endereco, telefone)</text:p>
        </text:list-item>
        <text:list-item>
          <text:p text:style-name="P5"><text:span text:style-name="T1">perfil</text:span> (<text:span text:style-name="T2">id</text:span>, nome, tipo, id_usuario_FK)</text:p>
        </text:list-item>
        <text:list-item>
          <text:p text:style-name="P5"><text:span text:style-name="T1">assinatura</text:span> (<text:span text:style-name="T2">id</text:span>, data_inicio, data_fim, status, id_usuario_FK)</text:p>
        </text:list-item>
        <text:list-item>
          <text:p text:style-name="P5"><text:span text:style-name="T1">plat_pagamento</text:span> (<text:span text:style-name="T2">id_plataforma</text:span>, nome, tipo, status)</text:p>
        </text:list-item>
        <text:list-item>
          <text:p text:style-name="P5"><text:span text:style-name="T1">pagamento</text:span> (<text:span text:style-name="T2">id</text:span>, valor, data_pagamento, status, id_assinatura_FK, id_plataforma_FK)</text:p>
        </text:list-item>
        <text:list-item>
          <text:p text:style-name="P5"><text:span text:style-name="T1">dispositivo</text:span> (<text:span text:style-name="T2">id</text:span>, tipo, sistema, modelo)</text:p>
        </text:list-item>
        <text:list-item>
          <text:p text:style-name="P5"><text:span text:style-name="T1">acesso</text:span> (<text:span text:style-name="T2">id</text:span>, data_hora, login, ip, localizacao, id_usuario_FK, id_dispositivo_FK)</text:p>
        </text:list-item>
        <text:list-item>
          <text:p text:style-name="P5"><text:span text:style-name="T1">listas</text:span> (<text:span text:style-name="T2">id</text:span>, nome, data_criacao, id_perfil_FK)</text:p>
        </text:list-item>
        <text:list-item>
          <text:p text:style-name="P5"><text:span text:style-name="T1">classificacao</text:span> (<text:span text:style-name="T2">id</text:span>, faixa_etaria)</text:p>
        </text:list-item>
        <text:list-item>
          <text:p text:style-name="P5"><text:span text:style-name="T1">midia</text:span> (<text:span text:style-name="T2">id_midia</text:span>, titulo, sinopse, data_lancamento, id_classificacao_FK)</text:p>
        </text:list-item>
        <text:list-item>
          <text:p text:style-name="P5"><text:span text:style-name="T1">filme</text:span> (<text:span text:style-name="T2">id_midia_FK</text:span>, duracao_total, diretor, oscar_vencido)</text:p>
        </text:list-item>
        <text:list-item>
          <text:p text:style-name="P5"><text:span text:style-name="T1">serie</text:span> (<text:span text:style-name="T2">id_midia_FK</text:span>, status, data_inicio, data_fim)</text:p>
        </text:list-item>
        <text:list-item>
          <text:p text:style-name="P5"><text:span text:style-name="T1">temporada</text:span> (<text:span text:style-name="T2">id</text:span>, numero, descricao, id_midia_serie_FK)</text:p>
        </text:list-item>
        <text:list-item>
          <text:p text:style-name="P5"><text:span text:style-name="T1">episodio</text:span> (<text:span text:style-name="T2">id</text:span>, numero_episodio, id_temporada_FK)</text:p>
        </text:list-item>
        <text:list-item>
          <text:p text:style-name="P5"><text:span text:style-name="T1">categoria</text:span> (<text:span text:style-name="T2">id</text:span>, nome, descricao)</text:p>
        </text:list-item>
        <text:list-item>
          <text:p text:style-name="P5"><text:span text:style-name="T1">midia_categoria</text:span> (<text:span text:style-name="T2">id_midia_FK</text:span>, <text:span text:style-name="T2">id_categoria_FK</text:span>)</text:p>
        </text:list-item>
        <text:list-item>
          <text:p text:style-name="P5"><text:span text:style-name="T1">audio</text:span> (<text:span text:style-name="T2">id</text:span>, idioma, formato, id_midia_FK, id_episodio_FK)</text:p>
        </text:list-item>
        <text:list-item>
          <text:p text:style-name="P5"><text:span text:style-name="T1">legendas</text:span> (<text:span text:style-name="T2">id</text:span>, idioma, formato, id_midia_FK, id_episodio_FK)</text:p>
        </text:list-item>
        <text:list-item>
          <text:p text:style-name="P5"><text:span text:style-name="T1">avaliacao</text:span> (<text:span text:style-name="T2">id</text:span>, nota, comentario, data_avaliacao, id_perfil_FK, id_midia_FK)</text:p>
        </text:list-item>
        <text:list-item>
          <text:p text:style-name="P5"><text:span text:style-name="T1">recomendacao</text:span> (<text:span text:style-name="T2">id</text:span>, data, algoritmo, id_perfil_FK, id_midia_FK)</text:p>
        </text:list-item>
        <text:list-item>
          <text:p text:style-name="P5"><text:span text:style-name="T1">hist_visualizacao</text:span> (<text:span text:style-name="T2">id</text:span>, data_visualizacao, progresso, id_perfil_FK, id_midia_FK, id_episodio_FK)</text:p>
        </text:list-item>
      </text:list>
      <text:p text:style-name="P6"/>
      <text:h text:style-name="P7" text:outline-level="3">2. Aplicando a 1FN:</text:h>
      <text:p text:style-name="P8"><text:span text:style-name="T3">As mudanças feitas foram: Padronização das chaves primarias, em temporada(</text:span>id_midia_serie_FK <text:span text:style-name="T3">virou </text:span>id_serie_FK<text:span text:style-name="T3">) e midia_categoria recebeu uma chave composta, ficando:</text:span></text:p>
      <text:list text:continue-numbering="true" text:style-name="WWNum1">
        <text:list-item>
          <text:p text:style-name="P9"><text:span text:style-name="T1">Usuario </text:span>(<text:span text:style-name="T2">id_usuario</text:span>, nome, cpf, email, endereco, telefone)</text:p>
        </text:list-item>
        <text:list-item>
          <text:p text:style-name="P10"><text:span text:style-name="T1">perfil </text:span>(<text:span text:style-name="T2">id_perfil</text:span>, nome, tipo, id_usuario_FK)</text:p>
        </text:list-item>
        <text:list-item>
          <text:p text:style-name="P10"><text:span text:style-name="T1">lista </text:span>(<text:span text:style-name="T2">id_lista</text:span>, nome, data_criacao, id_perfil_FK)</text:p>
        </text:list-item>
        <text:list-item>
          <text:p text:style-name="P10"><text:span text:style-name="T1">acesso </text:span>(<text:span text:style-name="T2">id_acesso</text:span>, data_hora, login, ip, localizacao, id_usuario_FK, id_dispositivo_FK)</text:p>
        </text:list-item>
        <text:list-item>
          <text:p text:style-name="P10"><text:span text:style-name="T1">dispositivo </text:span>(<text:span text:style-name="T2">id_dispositivo</text:span>, tipo, sistema_operacional, modelo)</text:p>
        </text:list-item>
        <text:list-item>
          <text:p text:style-name="P10"><text:span text:style-name="T1">assinatura </text:span>(<text:span text:style-name="T2">id_assinatura</text:span>, data_inicio, data_fim, status, id_usuario_FK)</text:p>
        </text:list-item>
        <text:list-item>
          <text:p text:style-name="P10"><text:span text:style-name="T1">plat_pagamento </text:span>(<text:span text:style-name="T2">id_plataforma</text:span>, nome, tipo, status)</text:p>
        </text:list-item>
        <text:list-item>
          <text:p text:style-name="P10"><text:span text:style-name="T1">pagamento </text:span>(<text:span text:style-name="T2">id_pagamento</text:span>, valor, data_pagamento, status, id_assinatura_FK, id_plataforma_FK)</text:p>
        </text:list-item>
        <text:list-item>
          <text:p text:style-name="P10"><text:span text:style-name="T1">classificacao </text:span>(<text:span text:style-name="T2">id_classificacao</text:span>, faixa_etaria)</text:p>
        </text:list-item>
        <text:list-item>
          <text:p text:style-name="P10"><text:span text:style-name="T1">midia </text:span>(<text:span text:style-name="T2">id_midia</text:span>, titulo, sinopse, data_lancamento, id_classificacao_FK)</text:p>
        </text:list-item>
        <text:list-item>
          <text:p text:style-name="P10"><text:span text:style-name="T1">filme </text:span>(<text:span text:style-name="T2">id_midia_FK</text:span>, duracao_total, diretor, oscar_vencidos)</text:p>
        </text:list-item>
        <text:list-item>
          <text:p text:style-name="P10"><text:span text:style-name="T1">serie </text:span>(<text:span text:style-name="T2">id_midia_FK</text:span>, titulo, descricao, data_inicio, data_fim)</text:p>
        </text:list-item>
        <text:list-item>
          <text:p text:style-name="P10"><text:span text:style-name="T1">temporada </text:span>(<text:span text:style-name="T2">id_temporada</text:span>, numero, descricao, id_serie_FK)</text:p>
        </text:list-item>
        <text:list-item>
          <text:p text:style-name="P10"><text:span text:style-name="T1">episodio </text:span>(<text:span text:style-name="T2">id_episodio</text:span>, numero_episodio, id_temporada_FK)</text:p>
        </text:list-item>
        <text:list-item>
          <text:p text:style-name="P10"><text:span text:style-name="T1">categoria </text:span>(<text:span text:style-name="T2">id_categoria</text:span>, nome, descricao)</text:p>
        </text:list-item>
        <text:list-item>
          <text:p text:style-name="P10"><text:span text:style-name="T1">midia_categoria </text:span>(<text:span text:style-name="T2">id_midia</text:span>, <text:span text:style-name="T2">id_categoria</text:span>, pk(id_midia, id_categoria))</text:p>
        </text:list-item>
        <text:list-item>
          <text:p text:style-name="P10"><text:span text:style-name="T1">audio </text:span>(<text:span text:style-name="T2">id_audio</text:span>, idioma, formato, id_midia_FK, id_episodio_FK)</text:p>
        </text:list-item>
        <text:list-item>
          <text:p text:style-name="P10"><text:span text:style-name="T1">legenda </text:span>(<text:span text:style-name="T2">id_legenda</text:span>, idioma, formato, id_midia_FK, id_episodio_FK)</text:p>
        </text:list-item>
        <text:list-item>
          <text:p text:style-name="P10"><text:span text:style-name="T1">avaliacao </text:span>(<text:span text:style-name="T2">id_avaliacao</text:span>, nota, comentario, data_avaliacao, id_perfil_FK, id_midia_FK)</text:p>
        </text:list-item>
        <text:list-item>
          <text:p text:style-name="P10"><text:span text:style-name="T1">recomendacao </text:span>(<text:span text:style-name="T2">id_recomendacao</text:span>, algoritmo, data_geracao, id_perfil_FK, id_midia_FK)</text:p>
        </text:list-item>
        <text:list-item>
          <text:p text:style-name="P10"><text:span text:style-name="T1">hist_visualizacao </text:span>(<text:span text:style-name="T2">id_hist</text:span>, data_visualizacao, progresso, id_perfil_FK, id_midia_FK, id_episodio_FK)</text:p>
        </text:list-item>
      </text:list>
      <text:p text:style-name="Standard"/>
      <text:h text:style-name="P7" text:outline-level="3">3. Aplicando a 2FN:</text:h>
      <text:p text:style-name="P11">A tabela já está na sua segunda forma, pois todos os atributos não-chave dependam da chave primária completa. </text:p>
      <text:p text:style-name="P6"/>
      <text:h text:style-name="P7" text:outline-level="3">4. Aplicando a 3FN:</text:h>
      <text:p text:style-name="P12">As informações de <text:span text:style-name="Strong_20_Emphasis"><text:span text:style-name="T4">classificação indicativa</text:span></text:span> foram separadas da tabela de mídia para evitar dependência transitiva.</text:p>
      <text:p text:style-name="Text_20_body">classificacao (id_classificacao, faixa_etaria)<text:line-break/>midia (id_midia, titulo, sinopse, data_lancamento, id_classificacao_FK)</text:p>
      <text:p text:style-name="P12">As características específicas de cada tipo de mídia foram separadas em tabelas próprias.</text:p>
      <text:p text:style-name="Text_20_body">filme (id_midia_FK, duracao_total, diretor, oscar_vencidos)<text:line-break/>serie (id_midia_FK, data_inicio, data_fim)</text:p>
      <text:p text:style-name="P12">A estrutura hierárquica de séries foi dividida em entidades próprias.</text:p>
      <text:p text:style-name="Text_20_body">temporada (id_temporada, numero, descricao, id_serie_FK)<text:line-break/>episodio (id_episodio, numero_episodio, id_temporada_FK)</text:p>
      <text:p text:style-name="Text_20_body">As informações de áudio e legenda foram separadas para permitir múltiplos registros por mídia ou episódio.</text:p>
      <text:p text:style-name="Text_20_body">audio (id_audio, idioma, formato, id_midia_FK, id_episodio_FK)<text:line-break/><text:soft-page-break/><text:span text:style-name="T3">L</text:span>egenda (id_legenda, idioma, formato, id_midia_FK, id_episodio_FK)</text:p>
      <text:p text:style-name="Text_20_body"><text:span text:style-name="T3">C</text:span>om tudo isso a tabela ficou da seguinte maneira:</text:p>
      <text:list text:style-name="L1">
        <text:list-item>
          <text:p text:style-name="P13"><text:span text:style-name="Strong_20_Emphasis">usuario </text:span>(<text:span text:style-name="T2">id_usuario</text:span>, nome, cpf, email, endereco, telefone)</text:p>
        </text:list-item>
        <text:list-item>
          <text:p text:style-name="P14"><text:span text:style-name="Strong_20_Emphasis">perfil </text:span>(<text:span text:style-name="T2">id_perfil</text:span>, nome, tipo, id_usuario_FK)</text:p>
        </text:list-item>
        <text:list-item>
          <text:p text:style-name="P14"><text:span text:style-name="Strong_20_Emphasis">lista </text:span>(<text:span text:style-name="T2">id_lista</text:span>, nome, data_criacao, id_perfil_FK)</text:p>
        </text:list-item>
        <text:list-item>
          <text:p text:style-name="P14"><text:span text:style-name="Strong_20_Emphasis">acesso </text:span>(<text:span text:style-name="T2">id_acesso</text:span>, data_hora, login, ip, localizacao, id_usuario_FK, id_dispositivo_FK)</text:p>
        </text:list-item>
        <text:list-item>
          <text:p text:style-name="P14"><text:span text:style-name="Strong_20_Emphasis">dispositivo </text:span>(<text:span text:style-name="T2">id_dispositivo</text:span>, tipo, sistema_operacional, modelo)</text:p>
        </text:list-item>
        <text:list-item>
          <text:p text:style-name="P14"><text:span text:style-name="Strong_20_Emphasis">assinatura </text:span>(<text:span text:style-name="T2">id_assinatura</text:span>, data_inicio, data_fim, status, id_usuario_FK)</text:p>
        </text:list-item>
        <text:list-item>
          <text:p text:style-name="P14"><text:span text:style-name="Strong_20_Emphasis">plat_pagamento </text:span>(<text:span text:style-name="T2">id_plataforma</text:span>, nome, tipo, status)</text:p>
        </text:list-item>
        <text:list-item>
          <text:p text:style-name="P14"><text:span text:style-name="Strong_20_Emphasis">pagamento </text:span>(<text:span text:style-name="T2">id_pagamento</text:span>, valor, data_pagamento, status, id_assinatura_FK, id_plataforma_FK)</text:p>
        </text:list-item>
        <text:list-item>
          <text:p text:style-name="P14"><text:span text:style-name="Strong_20_Emphasis">classificacao </text:span>(<text:span text:style-name="T2">id_classificacao</text:span>, faixa_etaria)</text:p>
        </text:list-item>
        <text:list-item>
          <text:p text:style-name="P14"><text:span text:style-name="Strong_20_Emphasis">midia </text:span>(<text:span text:style-name="T2">id_midia</text:span>, titulo, sinopse, data_lancamento, id_classificacao_FK)</text:p>
        </text:list-item>
        <text:list-item>
          <text:p text:style-name="P14"><text:span text:style-name="Strong_20_Emphasis">filme </text:span>(<text:span text:style-name="T2">id_midia_FK</text:span>, duracao_total, diretor, oscar_vencidos)</text:p>
        </text:list-item>
        <text:list-item>
          <text:p text:style-name="P14"><text:span text:style-name="Strong_20_Emphasis">serie </text:span>(<text:span text:style-name="T2">id_midia_FK</text:span>, data_inicio, data_fim)</text:p>
        </text:list-item>
        <text:list-item>
          <text:p text:style-name="P14"><text:span text:style-name="Strong_20_Emphasis">temporada </text:span>(<text:span text:style-name="T2">id_temporada</text:span>, numero, descricao, id_serie_FK)</text:p>
        </text:list-item>
        <text:list-item>
          <text:p text:style-name="P14"><text:span text:style-name="Strong_20_Emphasis">episodio </text:span>(<text:span text:style-name="T2">id_episodio</text:span>, numero_episodio, id_temporada_FK)</text:p>
        </text:list-item>
        <text:list-item>
          <text:p text:style-name="P14"><text:span text:style-name="Strong_20_Emphasis">categoria </text:span>(<text:span text:style-name="T2">id_categoria</text:span>, nome, descricao)</text:p>
        </text:list-item>
        <text:list-item>
          <text:p text:style-name="P14"><text:span text:style-name="Strong_20_Emphasis">midia_categoria </text:span>(<text:span text:style-name="T2">id_midia_FK</text:span>, <text:span text:style-name="T2">id_categoria_FK)</text:span></text:p>
        </text:list-item>
        <text:list-item>
          <text:p text:style-name="P14"><text:span text:style-name="Strong_20_Emphasis">audio </text:span>(<text:span text:style-name="T2">id_audio</text:span>, idioma, formato, id_midia_FK, id_episodio_FK)</text:p>
        </text:list-item>
        <text:list-item>
          <text:p text:style-name="P14"><text:span text:style-name="Strong_20_Emphasis">legenda </text:span>(<text:span text:style-name="T2">id_legenda</text:span>, idioma, formato, id_midia_FK, id_episodio_FK)</text:p>
        </text:list-item>
        <text:list-item>
          <text:p text:style-name="P14"><text:span text:style-name="Strong_20_Emphasis">avaliacao </text:span>(<text:span text:style-name="T2">id_avaliacao</text:span>, nota, comentario, data_avaliacao, id_perfil_FK, id_midia_FK)</text:p>
        </text:list-item>
        <text:list-item>
          <text:p text:style-name="P14"><text:span text:style-name="Strong_20_Emphasis">recomendacao </text:span>(<text:span text:style-name="T2">id_recomendacao</text:span>, algoritmo, data_geracao, id_perfil_FK, id_midia_FK)</text:p>
        </text:list-item>
        <text:list-item>
          <text:p text:style-name="P14"><text:span text:style-name="Strong_20_Emphasis">hist_visualizacao </text:span>(i<text:span text:style-name="T2">d_hist, data_visualizacao</text:span>, progresso, id_perfil_FK, id_midia_FK, id_episodio_FK)</text:p>
          <text:p text:style-name="P15"/>
        </text:list-item>
      </text:list>
      <text:p text:style-name="Text_20_body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pt" fo:country="BR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orphans="0" fo:widows="0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t" fo:country="BR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normal" style:next-style-name="Text_20_body" style:default-outline-level="" style:list-style-name="" style:class="chapter">
      <style:paragraph-properties fo:margin-top="0.847cm" fo:margin-bottom="0.212cm" style:contextual-spacing="false" fo:line-height="100%" fo:text-align="start" style:justify-single-word="false" fo:keep-together="always" fo:keep-with-next="always"/>
      <style:text-properties style:font-name="Arial2" fo:font-family="Arial" style:font-family-generic="swiss" style:font-pitch="variable" fo:font-size="36pt" fo:font-weight="bold" style:font-name-asian="Microsoft YaHei" style:font-family-asian="'Microsoft YaHei'" style:font-family-generic-asian="system" style:font-pitch-asian="variable" style:font-size-asian="36pt" style:font-weight-asian="bold" style:font-name-complex="Arial3" style:font-family-complex="Arial" style:font-family-generic-complex="system" style:font-pitch-complex="variable" style:font-size-complex="36pt" style:font-weight-complex="bold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 loext:opacity="0%"/>
    </style:style>
    <style:style style:name="Heading_20_1" style:display-name="Heading 1" style:family="paragraph" style:parent-style-name="normal" style:next-style-name="Text_20_body" style:default-outline-level="1" style:list-style-name="" style:class="chapter">
      <loext:graphic-properties draw:fill="solid" draw:fill-color="#ffffff" draw:opacity="100%"/>
      <style:paragraph-properties fo:margin-top="0.423cm" fo:margin-bottom="0.423cm" style:contextual-spacing="false" fo:line-height="100%" fo:background-color="#ffffff" fo:padding="0cm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Text_20_body" style:default-outline-level="2" style:list-style-name="" style:class="chapter">
      <loext:graphic-properties draw:fill="solid" draw:fill-color="#ffffff" draw:opacity="100%"/>
      <style:paragraph-properties fo:margin-top="0.397cm" fo:margin-bottom="0.397cm" style:contextual-spacing="false" fo:line-height="100%" fo:background-color="#ffffff" fo:padding="0cm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Text_20_body" style:default-outline-level="3" style:list-style-name="" style:class="chapter">
      <loext:graphic-properties draw:fill="solid" draw:fill-color="#ffffff" draw:opacity="100%"/>
      <style:paragraph-properties fo:margin-top="0.423cm" fo:margin-bottom="0.423cm" style:contextual-spacing="false" fo:line-height="100%" fo:background-color="#ffffff" fo:padding="0cm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Text_20_body" style:default-outline-level="4" style:list-style-name="" style:class="chapter">
      <loext:graphic-properties draw:fill="solid" draw:fill-color="#ffffff" draw:opacity="100%"/>
      <style:paragraph-properties fo:margin-top="0.45cm" fo:margin-bottom="0.45cm" style:contextual-spacing="false" fo:line-height="100%" fo:background-color="#ffffff" fo:padding="0cm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Text_20_body" style:default-outline-level="5" style:list-style-name="" style:class="chapter">
      <loext:graphic-properties draw:fill="solid" draw:fill-color="#ffffff" draw:opacity="100%"/>
      <style:paragraph-properties fo:margin-top="0.45cm" fo:margin-bottom="0.45cm" style:contextual-spacing="false" fo:line-height="100%" fo:background-color="#ffffff" fo:padding="0cm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Text_20_body" style:default-outline-level="6" style:list-style-name="" style:class="chapter">
      <loext:graphic-properties draw:fill="solid" draw:fill-color="#ffffff" draw:opacity="100%"/>
      <style:paragraph-properties fo:margin-top="0.635cm" fo:margin-bottom="0.635cm" style:contextual-spacing="false" fo:line-height="100%" fo:background-color="#ffffff" fo:padding="0cm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style:contextual-spacing="false" fo:line-height="100%" fo:text-align="start" style:justify-single-word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 style:font-style-complex="normal" style:font-weight-complex="norma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text:style-name="ListLabel_20_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text:style-name="ListLabel_20_1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text:style-name="ListLabel_20_1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text:style-name="ListLabel_20_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text:style-name="ListLabel_20_1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text:style-name="ListLabel_20_1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text:style-name="ListLabel_20_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18T11:48:20.318315767</dc:date>
    <meta:generator>LibreOffice/26.2.3.2$Linux_X86_64 LibreOffice_project/620$Build-2</meta:generator>
    <meta:editing-duration>PT41M52S</meta:editing-duration>
    <meta:editing-cycles>2</meta:editing-cycles>
    <meta:document-statistic meta:table-count="0" meta:image-count="0" meta:object-count="0" meta:page-count="3" meta:paragraph-count="87" meta:word-count="623" meta:character-count="5607" meta:non-whitespace-character-count="5133"/>
  </office:meta>
</office:document-meta>
</file>